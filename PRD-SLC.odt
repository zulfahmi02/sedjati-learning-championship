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fo:line-height="150%" fo:text-align="center" style:justify-single-word="false"/>
      <style:text-properties officeooo:paragraph-rsid="0013b394"/>
    </style:style>
    <style:style style:name="P2" style:family="paragraph" style:parent-style-name="Text_20_body">
      <style:paragraph-properties fo:margin-top="0in" fo:margin-bottom="0in" style:contextual-spacing="false" fo:line-height="150%" fo:text-align="left" style:justify-single-word="false"/>
      <style:text-properties style:font-name="Liberation Serif" fo:font-size="12pt" officeooo:paragraph-rsid="0016150e" style:font-size-asian="12pt" style:font-size-complex="12pt"/>
    </style:style>
    <style:style style:name="P3" style:family="paragraph" style:parent-style-name="Text_20_body" style:list-style-name="L1">
      <style:paragraph-properties fo:margin-top="0in" fo:margin-bottom="0in" style:contextual-spacing="false" fo:line-height="150%"/>
      <style:text-properties style:font-name="Liberation Serif" fo:font-size="12pt" fo:font-weight="bold" officeooo:rsid="0016150e" officeooo:paragraph-rsid="0016150e" style:font-size-asian="12pt" style:font-weight-asian="bold" style:font-size-complex="12pt" style:font-weight-complex="bold"/>
    </style:style>
    <style:style style:name="P4" style:family="paragraph" style:parent-style-name="Text_20_body" style:list-style-name="L1">
      <style:paragraph-properties fo:margin-left="0in" fo:margin-top="0in" fo:margin-bottom="0in" style:contextual-spacing="false" fo:line-height="150%" fo:text-indent="0in" style:auto-text-indent="false"/>
      <style:text-properties fo:font-weight="normal" officeooo:rsid="0016150e" officeooo:paragraph-rsid="0016150e" style:font-weight-asian="normal" style:font-weight-complex="normal"/>
    </style:style>
    <style:style style:name="P5" style:family="paragraph" style:parent-style-name="Text_20_body">
      <style:paragraph-properties fo:margin-left="0.4925in" fo:line-height="150%" fo:text-indent="0in" style:auto-text-indent="false"/>
      <style:text-properties officeooo:rsid="0016150e"/>
    </style:style>
    <style:style style:name="P6" style:family="paragraph" style:parent-style-name="Text_20_body" style:list-style-name="L1">
      <style:paragraph-properties fo:margin-top="0in" fo:margin-bottom="0in" style:contextual-spacing="false" fo:line-height="150%"/>
      <style:text-properties style:font-name="Liberation Serif" fo:font-size="12pt" fo:font-weight="normal" officeooo:rsid="0016150e" officeooo:paragraph-rsid="0016150e" style:font-size-asian="12pt" style:font-weight-asian="normal" style:font-size-complex="12pt" style:font-weight-complex="normal"/>
    </style:style>
    <style:style style:name="P7" style:family="paragraph" style:parent-style-name="Text_20_body" style:list-style-name="L1">
      <style:paragraph-properties fo:margin-top="0in" fo:margin-bottom="0in" style:contextual-spacing="false" fo:line-height="150%"/>
    </style:style>
    <style:style style:name="P8" style:family="paragraph" style:parent-style-name="Text_20_body" style:list-style-name="L1">
      <style:paragraph-properties fo:margin-top="0in" fo:margin-bottom="0in" style:contextual-spacing="false" fo:line-height="150%"/>
      <style:text-properties style:font-name="Liberation Serif" fo:font-size="12pt" fo:font-weight="bold" officeooo:rsid="0013b394" officeooo:paragraph-rsid="0013b394" style:font-size-asian="12pt" style:font-weight-asian="bold" style:font-size-complex="12pt" style:font-weight-complex="bold"/>
    </style:style>
    <style:style style:name="P9" style:family="paragraph" style:parent-style-name="Text_20_body" style:list-style-name="L1">
      <style:paragraph-properties fo:margin-top="0in" fo:margin-bottom="0in" style:contextual-spacing="false" fo:line-height="150%"/>
      <style:text-properties style:font-name="Liberation Serif" fo:font-size="12pt" fo:font-weight="normal" officeooo:rsid="0013b394" officeooo:paragraph-rsid="0013b394" style:font-size-asian="12pt" style:font-weight-asian="normal" style:font-size-complex="12pt" style:font-weight-complex="normal"/>
    </style:style>
    <style:style style:name="P10" style:family="paragraph" style:parent-style-name="Text_20_body" style:list-style-name="L2">
      <style:paragraph-properties fo:margin-top="0in" fo:margin-bottom="0in" style:contextual-spacing="false" fo:line-height="150%"/>
      <style:text-properties fo:font-weight="normal" officeooo:rsid="0013b394" officeooo:paragraph-rsid="0013b394" style:font-weight-asian="normal" style:font-weight-complex="normal"/>
    </style:style>
    <style:style style:name="P11" style:family="paragraph" style:parent-style-name="Text_20_body" style:list-style-name="L2">
      <style:paragraph-properties fo:margin-top="0in" fo:margin-bottom="0in" style:contextual-spacing="false" fo:line-height="150%"/>
      <style:text-properties officeooo:rsid="0013b394"/>
    </style:style>
    <style:style style:name="P12" style:family="paragraph" style:parent-style-name="Text_20_body" style:list-style-name="L1">
      <style:paragraph-properties fo:margin-top="0in" fo:margin-bottom="0in" style:contextual-spacing="false" fo:line-height="150%"/>
      <style:text-properties style:font-name="Liberation Serif" fo:font-size="12pt" officeooo:paragraph-rsid="0013b394" style:font-size-asian="12pt" style:font-size-complex="12pt"/>
    </style:style>
    <style:style style:name="P13" style:family="paragraph" style:parent-style-name="Text_20_body" style:list-style-name="L3">
      <style:paragraph-properties fo:margin-top="0in" fo:margin-bottom="0in" style:contextual-spacing="false" fo:line-height="150%"/>
      <style:text-properties officeooo:paragraph-rsid="00171aa1"/>
    </style:style>
    <style:style style:name="P14" style:family="paragraph" style:parent-style-name="Text_20_body">
      <style:paragraph-properties fo:line-height="150%"/>
      <style:text-properties officeooo:rsid="0016150e"/>
    </style:style>
    <style:style style:name="P15" style:family="paragraph" style:parent-style-name="Text_20_body" style:list-style-name="L4">
      <style:paragraph-properties fo:margin-top="0in" fo:margin-bottom="0in" style:contextual-spacing="false" fo:line-height="150%"/>
      <style:text-properties style:font-name="Liberation Serif" fo:font-size="12pt" officeooo:rsid="0016150e" style:font-size-asian="12pt" style:font-size-complex="12pt"/>
    </style:style>
    <style:style style:name="P16" style:family="paragraph" style:parent-style-name="Text_20_body" style:list-style-name="L4">
      <style:paragraph-properties fo:line-height="150%"/>
      <style:text-properties style:font-name="Liberation Serif" fo:font-size="12pt" officeooo:rsid="0016150e" style:font-size-asian="12pt" style:font-size-complex="12pt"/>
    </style:style>
    <style:style style:name="P17" style:family="paragraph" style:parent-style-name="Heading_20_2" style:list-style-name="L3">
      <style:paragraph-properties fo:margin-top="0in" fo:margin-bottom="0in" style:contextual-spacing="false" fo:line-height="150%"/>
      <style:text-properties officeooo:paragraph-rsid="0013b394"/>
    </style:style>
    <style:style style:name="P18" style:family="paragraph" style:parent-style-name="Text_20_body">
      <style:paragraph-properties fo:line-height="150%"/>
      <style:text-properties officeooo:rsid="0016150e" style:font-size-asian="12pt"/>
    </style:style>
    <style:style style:name="P19" style:family="paragraph" style:parent-style-name="Text_20_body" style:list-style-name="L5">
      <style:paragraph-properties fo:margin-top="0in" fo:margin-bottom="0in" style:contextual-spacing="false" fo:line-height="150%"/>
      <style:text-properties style:font-name="Liberation Serif" fo:font-size="12pt" officeooo:rsid="0016150e" style:font-size-asian="12pt" style:font-size-complex="12pt"/>
    </style:style>
    <style:style style:name="P20" style:family="paragraph" style:parent-style-name="Text_20_body" style:list-style-name="L5">
      <style:paragraph-properties fo:line-height="150%"/>
      <style:text-properties style:font-name="Liberation Serif" fo:font-size="12pt" officeooo:rsid="0016150e" officeooo:paragraph-rsid="00171aa1" style:font-size-asian="12pt" style:font-size-complex="12pt"/>
    </style:style>
    <style:style style:name="P21" style:family="paragraph" style:parent-style-name="Text_20_body">
      <style:paragraph-properties fo:margin-left="0.4925in" fo:line-height="150%" fo:text-indent="0in" style:auto-text-indent="false"/>
      <style:text-properties officeooo:rsid="0016150e" style:font-size-asian="12pt"/>
    </style:style>
    <style:style style:name="P22" style:family="paragraph" style:parent-style-name="Text_20_body" style:list-style-name="L6">
      <style:paragraph-properties fo:margin-top="0in" fo:margin-bottom="0in" style:contextual-spacing="false" fo:line-height="150%"/>
      <style:text-properties style:font-name="Liberation Serif" fo:font-size="12pt" officeooo:rsid="0016150e" style:font-size-asian="12pt" style:font-size-complex="12pt"/>
    </style:style>
    <style:style style:name="P23" style:family="paragraph" style:parent-style-name="Text_20_body" style:list-style-name="L6">
      <style:paragraph-properties fo:line-height="150%"/>
      <style:text-properties style:font-name="Liberation Serif" fo:font-size="12pt" officeooo:rsid="0016150e" style:font-size-asian="12pt" style:font-size-complex="12pt"/>
    </style:style>
    <style:style style:name="P24" style:family="paragraph" style:parent-style-name="Heading_20_2">
      <style:paragraph-properties fo:margin-left="0.4925in" fo:line-height="150%" fo:text-indent="0in" style:auto-text-indent="false"/>
    </style:style>
    <style:style style:name="P25" style:family="paragraph" style:parent-style-name="Text_20_body" style:list-style-name="L7">
      <style:paragraph-properties fo:margin-top="0in" fo:margin-bottom="0in" style:contextual-spacing="false" fo:line-height="150%"/>
      <style:text-properties style:font-name="Liberation Serif" fo:font-size="12pt" officeooo:rsid="0016150e" style:font-size-asian="12pt" style:font-size-complex="12pt"/>
    </style:style>
    <style:style style:name="P26" style:family="paragraph" style:parent-style-name="Text_20_body" style:list-style-name="L7">
      <style:paragraph-properties fo:line-height="150%"/>
      <style:text-properties style:font-name="Liberation Serif" fo:font-size="12pt" officeooo:rsid="0016150e" style:font-size-asian="12pt" style:font-size-complex="12pt"/>
    </style:style>
    <style:style style:name="P27" style:family="paragraph" style:parent-style-name="Heading_20_2">
      <style:paragraph-properties fo:margin-left="0.4925in" fo:margin-top="0in" fo:margin-bottom="0.0972in" style:contextual-spacing="false" fo:line-height="150%" fo:text-indent="0in" style:auto-text-indent="false"/>
    </style:style>
    <style:style style:name="P28" style:family="paragraph" style:parent-style-name="Text_20_body" style:list-style-name="L8">
      <style:paragraph-properties fo:margin-top="0in" fo:margin-bottom="0in" style:contextual-spacing="false" fo:line-height="150%"/>
      <style:text-properties style:font-name="Liberation Serif" fo:font-size="12pt" officeooo:rsid="0016150e" style:font-size-asian="12pt" style:font-size-complex="12pt"/>
    </style:style>
    <style:style style:name="P29" style:family="paragraph" style:parent-style-name="Text_20_body" style:list-style-name="L8">
      <style:paragraph-properties fo:line-height="150%"/>
      <style:text-properties style:font-name="Liberation Serif" fo:font-size="12pt" officeooo:rsid="0016150e" style:font-size-asian="12pt" style:font-size-complex="12pt"/>
    </style:style>
    <style:style style:name="P30" style:family="paragraph" style:parent-style-name="Quotations">
      <style:paragraph-properties fo:margin-top="0in" fo:margin-bottom="0.0972in" style:contextual-spacing="false" fo:line-height="150%"/>
    </style:style>
    <style:style style:name="P31" style:family="paragraph" style:parent-style-name="Text_20_body" style:list-style-name="L9">
      <style:paragraph-properties fo:margin-top="0in" fo:margin-bottom="0in" style:contextual-spacing="false" fo:line-height="150%"/>
      <style:text-properties officeooo:paragraph-rsid="0013b394"/>
    </style:style>
    <style:style style:name="P32" style:family="paragraph" style:parent-style-name="Text_20_body" style:list-style-name="L9">
      <style:paragraph-properties fo:margin-top="0in" fo:margin-bottom="0in" style:contextual-spacing="false" fo:line-height="150%"/>
      <style:text-properties style:font-name="Liberation Serif" fo:font-size="12pt" fo:font-weight="bold" officeooo:rsid="00171aa1" officeooo:paragraph-rsid="00171aa1" style:font-size-asian="12pt" style:font-weight-asian="bold" style:font-size-complex="12pt" style:font-weight-complex="bold"/>
    </style:style>
    <style:style style:name="P33" style:family="paragraph" style:parent-style-name="Heading_20_1" style:list-style-name="L9">
      <style:paragraph-properties fo:margin-top="0in" fo:margin-bottom="0in" style:contextual-spacing="false" fo:line-height="150%"/>
      <style:text-properties style:font-name="Liberation Serif" fo:font-size="12pt" fo:font-weight="bold" officeooo:rsid="00171aa1" officeooo:paragraph-rsid="00171aa1" style:font-size-asian="12pt" style:font-weight-asian="bold" style:font-size-complex="12pt" style:font-weight-complex="bold"/>
    </style:style>
    <style:style style:name="P34" style:family="paragraph" style:parent-style-name="Text_20_body">
      <style:paragraph-properties fo:margin-left="0.4925in"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35" style:family="paragraph" style:parent-style-name="Heading_20_3">
      <style:paragraph-properties fo:margin-left="0.4925in" fo:margin-top="0in" fo:margin-bottom="0.1965in" style:contextual-spacing="false" fo:line-height="150%" fo:text-indent="0in" style:auto-text-indent="false"/>
      <style:text-properties style:font-name="Liberation Serif" fo:font-size="12pt" officeooo:rsid="00171aa1" style:font-size-asian="12pt" style:font-size-complex="12pt"/>
    </style:style>
    <style:style style:name="P36" style:family="paragraph" style:parent-style-name="Text_20_body" style:list-style-name="L10">
      <style:paragraph-properties fo:margin-left="0.4925in" fo:margin-top="0in" fo:margin-bottom="0in" style:contextual-spacing="false"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37" style:family="paragraph" style:parent-style-name="Text_20_body" style:list-style-name="L10">
      <style:paragraph-properties fo:margin-left="0.4925in"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38" style:family="paragraph" style:parent-style-name="Horizontal_20_Line">
      <style:paragraph-properties fo:margin-left="0.4925in" fo:margin-top="0in" fo:margin-bottom="0in" style:contextual-spacing="false"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39" style:family="paragraph" style:parent-style-name="Heading_20_1">
      <style:paragraph-properties fo:margin-left="0.4925in" fo:margin-top="0in" fo:margin-bottom="0.1965in" style:contextual-spacing="false" fo:line-height="150%" fo:text-indent="0in" style:auto-text-indent="false"/>
      <style:text-properties style:font-name="Liberation Serif" fo:font-size="12pt" officeooo:rsid="00171aa1" style:font-size-asian="12pt" style:font-size-complex="12pt"/>
    </style:style>
    <style:style style:name="P40" style:family="paragraph" style:parent-style-name="Text_20_body" style:list-style-name="L11">
      <style:paragraph-properties fo:margin-left="0.4925in" fo:margin-top="0in" fo:margin-bottom="0in" style:contextual-spacing="false"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41" style:family="paragraph" style:parent-style-name="Text_20_body" style:list-style-name="L11">
      <style:paragraph-properties fo:margin-left="0.4925in"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42" style:family="paragraph" style:parent-style-name="Text_20_body" style:list-style-name="L12">
      <style:paragraph-properties fo:margin-left="0.4925in" fo:margin-top="0in" fo:margin-bottom="0in" style:contextual-spacing="false"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43" style:family="paragraph" style:parent-style-name="Text_20_body" style:list-style-name="L12">
      <style:paragraph-properties fo:margin-left="0.4925in"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44" style:family="paragraph" style:parent-style-name="Text_20_body" style:list-style-name="L13">
      <style:paragraph-properties fo:margin-left="0.4925in" fo:margin-top="0in" fo:margin-bottom="0in" style:contextual-spacing="false"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45" style:family="paragraph" style:parent-style-name="Text_20_body" style:list-style-name="L13">
      <style:paragraph-properties fo:margin-left="0.4925in"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46" style:family="paragraph" style:parent-style-name="Text_20_body" style:list-style-name="L14">
      <style:paragraph-properties fo:margin-left="0.4925in" fo:margin-top="0in" fo:margin-bottom="0in" style:contextual-spacing="false"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47" style:family="paragraph" style:parent-style-name="Text_20_body" style:list-style-name="L14">
      <style:paragraph-properties fo:margin-left="0.4925in"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48" style:family="paragraph" style:parent-style-name="Text_20_body" style:list-style-name="L15">
      <style:paragraph-properties fo:margin-left="0.4925in" fo:margin-top="0in" fo:margin-bottom="0in" style:contextual-spacing="false"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49" style:family="paragraph" style:parent-style-name="Text_20_body" style:list-style-name="L15">
      <style:paragraph-properties fo:margin-left="0.4925in"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50" style:family="paragraph" style:parent-style-name="Text_20_body" style:list-style-name="L16">
      <style:paragraph-properties fo:margin-left="0.4925in" fo:margin-top="0in" fo:margin-bottom="0in" style:contextual-spacing="false"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51" style:family="paragraph" style:parent-style-name="Text_20_body" style:list-style-name="L16">
      <style:paragraph-properties fo:margin-left="0.4925in"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52" style:family="paragraph" style:parent-style-name="Text_20_body" style:list-style-name="L17">
      <style:paragraph-properties fo:margin-left="0.4925in" fo:margin-top="0in" fo:margin-bottom="0in" style:contextual-spacing="false"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53" style:family="paragraph" style:parent-style-name="Text_20_body" style:list-style-name="L17">
      <style:paragraph-properties fo:margin-left="0.4925in"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54" style:family="paragraph" style:parent-style-name="Text_20_body" style:list-style-name="L18">
      <style:paragraph-properties fo:margin-left="0.4925in" fo:margin-top="0in" fo:margin-bottom="0in" style:contextual-spacing="false"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55" style:family="paragraph" style:parent-style-name="Text_20_body" style:list-style-name="L18">
      <style:paragraph-properties fo:margin-left="0.4925in"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56" style:family="paragraph" style:parent-style-name="Text_20_body" style:list-style-name="L19">
      <style:paragraph-properties fo:margin-left="0.4925in" fo:margin-top="0in" fo:margin-bottom="0in" style:contextual-spacing="false"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57" style:family="paragraph" style:parent-style-name="Text_20_body" style:list-style-name="L19">
      <style:paragraph-properties fo:margin-left="0.4925in"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58" style:family="paragraph" style:parent-style-name="Text_20_body" style:list-style-name="L20">
      <style:paragraph-properties fo:margin-left="0.4925in" fo:margin-top="0in" fo:margin-bottom="0in" style:contextual-spacing="false"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59" style:family="paragraph" style:parent-style-name="Text_20_body" style:list-style-name="L20">
      <style:paragraph-properties fo:margin-left="0.4925in"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60" style:family="paragraph" style:parent-style-name="Text_20_body" style:list-style-name="L21">
      <style:paragraph-properties fo:margin-left="0.4925in" fo:margin-top="0in" fo:margin-bottom="0in" style:contextual-spacing="false"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61" style:family="paragraph" style:parent-style-name="Text_20_body" style:list-style-name="L21">
      <style:paragraph-properties fo:margin-left="0.4925in"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62" style:family="paragraph" style:parent-style-name="Text_20_body" style:list-style-name="L22">
      <style:paragraph-properties fo:margin-left="0.4925in" fo:margin-top="0in" fo:margin-bottom="0in" style:contextual-spacing="false"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63" style:family="paragraph" style:parent-style-name="Text_20_body" style:list-style-name="L22">
      <style:paragraph-properties fo:margin-left="0.4925in"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64" style:family="paragraph" style:parent-style-name="Text_20_body" style:list-style-name="L23">
      <style:paragraph-properties fo:margin-left="0.4925in" fo:margin-top="0in" fo:margin-bottom="0in" style:contextual-spacing="false"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65" style:family="paragraph" style:parent-style-name="Text_20_body" style:list-style-name="L23">
      <style:paragraph-properties fo:margin-left="0.4925in" fo:line-height="150%" fo:text-indent="0in" style:auto-text-indent="false"/>
      <style:text-properties style:font-name="Liberation Serif" fo:font-size="12pt" fo:font-weight="bold" officeooo:rsid="00171aa1" style:font-size-asian="12pt" style:font-weight-asian="bold" style:font-size-complex="12pt" style:font-weight-complex="bold"/>
    </style:style>
    <style:style style:name="P66" style:family="paragraph" style:parent-style-name="Text_20_body" style:list-style-name="L24">
      <style:paragraph-properties fo:margin-left="0.4925in" fo:margin-top="0in" fo:margin-bottom="0in" style:contextual-spacing="false" fo:line-height="150%" fo:text-indent="0in" style:auto-text-indent="false"/>
      <style:text-properties style:font-name="Liberation Serif" fo:font-size="12pt" style:font-size-asian="12pt" style:font-size-complex="12pt"/>
    </style:style>
    <style:style style:name="P67" style:family="paragraph" style:parent-style-name="Text_20_body" style:list-style-name="L25">
      <style:paragraph-properties fo:margin-left="0.4925in" fo:line-height="150%" fo:text-indent="0in" style:auto-text-indent="false"/>
    </style:style>
    <style:style style:name="P68" style:family="paragraph" style:parent-style-name="Text_20_body" style:list-style-name="L26">
      <style:paragraph-properties fo:margin-left="0.4925in" fo:margin-top="0in" fo:margin-bottom="0in" style:contextual-spacing="false" fo:line-height="150%" fo:text-indent="0in" style:auto-text-indent="false"/>
      <style:text-properties style:font-name="Liberation Serif" fo:font-size="12pt" style:font-size-asian="12pt" style:font-size-complex="12pt"/>
    </style:style>
    <style:style style:name="P69" style:family="paragraph" style:parent-style-name="Text_20_body" style:list-style-name="L26">
      <style:paragraph-properties fo:margin-left="0.4925in" fo:margin-top="0in" fo:margin-bottom="0in" style:contextual-spacing="false" fo:line-height="150%" fo:text-indent="0in" style:auto-text-indent="false"/>
    </style:style>
    <style:style style:name="P70" style:family="paragraph" style:parent-style-name="Text_20_body" style:list-style-name="L26">
      <style:paragraph-properties fo:margin-left="0.4925in" fo:line-height="150%" fo:text-indent="0in" style:auto-text-indent="false"/>
    </style:style>
    <style:style style:name="P71" style:family="paragraph" style:parent-style-name="Heading_20_1">
      <style:paragraph-properties fo:margin-left="0.4925in" fo:line-height="150%" fo:text-indent="0in" style:auto-text-indent="false"/>
      <style:text-properties style:font-name="Liberation Serif" fo:font-size="12pt" style:font-size-asian="12pt" style:font-size-complex="12pt"/>
    </style:style>
    <style:style style:name="P72" style:family="paragraph" style:parent-style-name="Text_20_body">
      <style:paragraph-properties fo:margin-left="0.4925in" fo:line-height="150%" fo:text-indent="0in" style:auto-text-indent="false"/>
      <style:text-properties style:font-name="Liberation Serif" style:font-size-asian="12pt"/>
    </style:style>
    <style:style style:name="P73" style:family="paragraph" style:parent-style-name="Heading_20_3">
      <style:paragraph-properties fo:margin-left="0.4925in" fo:line-height="150%" fo:text-indent="0in" style:auto-text-indent="false"/>
      <style:text-properties style:font-name="Liberation Serif" fo:font-size="12pt" style:font-size-asian="12pt" style:font-size-complex="12pt"/>
    </style:style>
    <style:style style:name="P74" style:family="paragraph" style:parent-style-name="Horizontal_20_Line">
      <style:paragraph-properties fo:margin-left="0.4925in" fo:line-height="150%" fo:text-indent="0in" style:auto-text-indent="false"/>
      <style:text-properties style:font-name="Liberation Serif" fo:font-size="12pt" style:font-size-asian="12pt" style:font-size-complex="12pt"/>
    </style:style>
    <style:style style:name="P75" style:family="paragraph" style:parent-style-name="Text_20_body" style:list-style-name="L27">
      <style:paragraph-properties fo:margin-left="0.4925in" fo:margin-top="0in" fo:margin-bottom="0in" style:contextual-spacing="false" fo:line-height="150%" fo:text-indent="0in" style:auto-text-indent="false"/>
      <style:text-properties style:font-name="Liberation Serif" style:font-size-asian="12pt"/>
    </style:style>
    <style:style style:name="P76" style:family="paragraph" style:parent-style-name="Text_20_body" style:list-style-name="L27">
      <style:paragraph-properties fo:margin-left="0.4925in" fo:line-height="150%" fo:text-indent="0in" style:auto-text-indent="false"/>
      <style:text-properties style:font-name="Liberation Serif" style:font-size-asian="12pt"/>
    </style:style>
    <style:style style:name="P77" style:family="paragraph" style:parent-style-name="Standard">
      <style:paragraph-properties fo:line-height="150%"/>
      <style:text-properties style:font-name="Liberation Serif" fo:font-size="12pt" style:font-size-asian="12pt" style:font-size-complex="12pt"/>
    </style:style>
    <style:style style:name="T1" style:family="text">
      <style:text-properties style:font-name="Liberation Serif" fo:font-size="12pt" officeooo:rsid="0013b394" style:font-size-asian="12pt" style:font-size-complex="12pt"/>
    </style:style>
    <style:style style:name="T2" style:family="text">
      <style:text-properties style:font-name="Liberation Serif" fo:font-size="12pt" style:font-size-asian="12pt" style:font-size-complex="12pt"/>
    </style:style>
    <style:style style:name="T3" style:family="text">
      <style:text-properties style:font-name="Liberation Serif" fo:font-size="12pt" fo:font-weight="normal" style:font-size-asian="12pt" style:font-weight-asian="normal" style:font-size-complex="12pt" style:font-weight-complex="normal"/>
    </style:style>
    <style:style style:name="T4" style:family="text">
      <style:text-properties style:font-name="Liberation Serif" fo:font-size="12pt" fo:font-weight="bold" officeooo:rsid="0013b394" style:font-size-asian="12pt" style:font-weight-asian="bold" style:font-size-complex="12pt" style:font-weight-complex="bold"/>
    </style:style>
    <style:style style:name="T5" style:family="text">
      <style:text-properties style:font-name="Liberation Serif" fo:font-size="12pt" fo:font-weight="normal" officeooo:rsid="0013b394" style:font-size-asian="12pt" style:font-weight-asian="normal" style:font-size-complex="12pt" style:font-weight-complex="normal"/>
    </style:style>
    <style:style style:name="T6" style:family="text">
      <style:text-properties style:font-name="Liberation Serif" fo:font-size="12pt" fo:font-weight="normal" officeooo:rsid="00171aa1" style:font-size-asian="12pt" style:font-weight-asian="normal" style:font-size-complex="12pt" style:font-weight-complex="normal"/>
    </style:style>
    <style:style style:name="T7" style:family="text">
      <style:text-properties style:font-name="Liberation Serif" fo:font-size="12pt" fo:font-weight="normal" officeooo:rsid="0016150e" style:font-size-asian="12pt" style:font-weight-asian="normal" style:font-size-complex="12pt" style:font-weight-complex="normal"/>
    </style:style>
    <style:style style:name="T8" style:family="text">
      <style:text-properties style:font-name="Liberation Serif" fo:font-size="12pt" style:font-size-complex="12pt"/>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Perencannan PRD Sistem Penilaian Sedajati Learning Championship</text:span></text:span></text:p>
      <text:p text:style-name="P2"/>
      <text:list text:style-name="L1">
        <text:list-item>
          <text:p text:style-name="P3">Deskiripsi Sistem :</text:p>
          <text:p text:style-name="P4"><text:span text:style-name="Strong_20_Emphasis"><text:span text:style-name="T2">Sistem Penilaian Sedjati Learning Championship (SLC)</text:span></text:span><text:span text:style-name="T2"> merupakan aplikasi berbasis web yang dirancang untuk mendukung seluruh proses pelaksanaan penilaian dalam kegiatan Sedjati Learning Championship secara terintegrasi. Sistem ini berfungsi sebagai media pengelolaan data peserta, juri, panel penilaian, ronde perlombaan, serta proses pemberian nilai hingga menghasilkan peringkat akhir peserta secara otomatis.</text:span></text:p>
        </text:list-item>
      </text:list>
      <text:p text:style-name="P5"><text:span text:style-name="T2">Pada sistem ini, </text:span><text:span text:style-name="Strong_20_Emphasis"><text:span text:style-name="T2">Administrator</text:span></text:span><text:span text:style-name="T2"> bertanggung jawab mengelola seluruh konfigurasi perlombaan, mulai dari pengelolaan data peserta, data juri, pembentukan panel juri, penentuan ronde perlombaan, penyusunan kriteria penilaian beserta bobotnya, hingga publikasi hasil akhir perlombaan. Seluruh proses administrasi dilakukan melalui satu dashboard sehingga memudahkan panitia dalam mengelola jalannya perlombaan.</text:span></text:p>
      <text:p text:style-name="P5"><text:span text:style-name="T2">Setiap </text:span><text:span text:style-name="Strong_20_Emphasis"><text:span text:style-name="T2">Juri</text:span></text:span><text:span text:style-name="T2"> dapat mengakses sistem menggunakan akun yang telah diberikan oleh administrator. Setelah berhasil masuk, juri hanya dapat melihat peserta yang menjadi tanggung jawab panelnya serta memberikan penilaian sesuai ronde dan kriteria yang telah ditentukan. Sistem akan melakukan validasi terhadap hak akses juri sehingga setiap juri hanya dapat memberikan penilaian pada peserta yang menjadi tanggung jawabnya. Nilai yang telah dikirim dapat dikunci sesuai kebijakan administrator untuk menjaga integritas data penilaian.</text:span></text:p>
      <text:p text:style-name="P5"><text:span text:style-name="T2">Setelah seluruh proses penilaian selesai, sistem akan menghitung nilai akhir setiap peserta secara otomatis berdasarkan aturan perhitungan yang telah ditetapkan, termasuk bobot kriteria maupun bobot setiap ronde perlombaan. Hasil perhitungan kemudian disusun dalam bentuk klasemen atau </text:span><text:span text:style-name="Emphasis"><text:span text:style-name="T2">leaderboard</text:span></text:span><text:span text:style-name="T2"> yang dapat dipublikasikan oleh administrator kepada peserta maupun masyarakat umum.</text:span></text:p>
      <text:p text:style-name="P5"><text:span text:style-name="T2">Selain mendukung proses penilaian secara </text:span><text:span text:style-name="Strong_20_Emphasis"><text:span text:style-name="T2">real-time</text:span></text:span><text:span text:style-name="T2">, sistem juga menyediakan fasilitas ekspor hasil perlombaan ke dalam format dokumen seperti PDF maupun Excel sehingga memudahkan panitia dalam proses dokumentasi dan pelaporan.</text:span></text:p>
      <text:p text:style-name="P5"><text:span text:style-name="T2">Sistem ini dikembangkan sebagai aplikasi </text:span><text:span text:style-name="Strong_20_Emphasis"><text:span text:style-name="T2">single-event</text:span></text:span><text:span text:style-name="T2">, yaitu hanya digunakan untuk satu penyelenggaraan Sedjati Learning Championship. Meskipun demikian, struktur sistem dirancang secara modular sehingga dapat dikembangkan menjadi sistem multi-event pada versi berikutnya tanpa memerlukan perubahan arsitektur secara menyeluruh.</text:span></text:p>
      <text:list xml:id="list111335157513142" text:continue-numbering="true" text:style-name="L1">
        <text:list-item>
          <text:p text:style-name="P6"><text:soft-page-break/></text:p>
        </text:list-item>
        <text:list-item>
          <text:p text:style-name="P7"><text:span text:style-name="Strong_20_Emphasis"><text:span text:style-name="T2">Pahami Tujuan Produk: </text:span></text:span><text:span text:style-name="T2">Langkah awal adalah menjawab pertanyaan: </text:span><text:span text:style-name="Emphasis"><text:span text:style-name="T2">Masalah apa yang ingin diselesaikan oleh produk ini?</text:span></text:span><text:span text:style-name="T2"><text:line-break/>Contoh: Aplikasi ini bertujuan mempermudah pengguna dalam mengatur pengingat minum obat harian. </text:span></text:p>
        </text:list-item>
        <text:list-item>
          <text:p text:style-name="P8">Tujuan Produk</text:p>
          <text:p text:style-name="P9">Sistem Penilaian ini bertujuan untuk :</text:p>
        </text:list-item>
      </text:list>
      <text:list text:style-name="L2">
        <text:list-item>
          <text:p text:style-name="P10"><text:span text:style-name="Strong_20_Emphasis"><text:span text:style-name="T2">Mendigitalisasi proses penilaian perlombaan</text:span></text:span><text:span text:style-name="T2"> sehingga seluruh proses penilaian dilakukan secara terintegrasi melalui sistem berbasis web, menggantikan proses manual yang berpotensi menimbulkan kesalahan. </text:span></text:p>
        </text:list-item>
        <text:list-item>
          <text:p text:style-name="P11"><text:span text:style-name="Strong_20_Emphasis"><text:span text:style-name="T2">Meningkatkan efisiensi pengelolaan perlombaan</text:span></text:span><text:span text:style-name="T2"> dengan menyediakan sarana bagi administrator untuk mengelola data peserta, juri, panel penilaian, ronde perlombaan, dan kriteria penilaian dalam satu sistem. </text:span></text:p>
        </text:list-item>
        <text:list-item>
          <text:p text:style-name="P11"><text:span text:style-name="Strong_20_Emphasis"><text:span text:style-name="T2">Mempermudah proses penilaian oleh juri</text:span></text:span><text:span text:style-name="T2"> melalui antarmuka yang sederhana sehingga juri dapat memberikan penilaian secara cepat, terstruktur, dan sesuai dengan panel serta ronde yang menjadi tanggung jawabnya. </text:span></text:p>
        </text:list-item>
        <text:list-item>
          <text:p text:style-name="P11"><text:span text:style-name="Strong_20_Emphasis"><text:span text:style-name="T2">Mengotomatisasi proses perhitungan nilai</text:span></text:span><text:span text:style-name="T2"> berdasarkan bobot kriteria dan bobot ronde yang telah ditentukan, sehingga hasil penilaian lebih akurat dan konsisten. </text:span></text:p>
        </text:list-item>
        <text:list-item>
          <text:p text:style-name="P11"><text:span text:style-name="Strong_20_Emphasis"><text:span text:style-name="T2">Meningkatkan transparansi proses perlombaan</text:span></text:span><text:span text:style-name="T2"> dengan menyediakan informasi hasil penilaian dan klasemen yang dapat dipublikasikan secara terkendali setelah memperoleh persetujuan administrator. </text:span></text:p>
        </text:list-item>
        <text:list-item>
          <text:p text:style-name="P11"><text:span text:style-name="Strong_20_Emphasis"><text:span text:style-name="T2">Mengurangi risiko kesalahan administrasi</text:span></text:span><text:span text:style-name="T2"> seperti kesalahan pencatatan nilai, perhitungan manual, maupun rekapitulasi hasil perlombaan. </text:span></text:p>
        </text:list-item>
        <text:list-item>
          <text:p text:style-name="P11"><text:span text:style-name="Strong_20_Emphasis"><text:span text:style-name="T2">Menyediakan informasi perkembangan penilaian secara real-time</text:span></text:span><text:span text:style-name="T2">, sehingga administrator dapat memantau progres penilaian selama perlombaan berlangsung. </text:span></text:p>
        </text:list-item>
        <text:list-item>
          <text:p text:style-name="P11"><text:span text:style-name="Strong_20_Emphasis"><text:span text:style-name="T2">Mempermudah proses dokumentasi dan pelaporan</text:span></text:span><text:span text:style-name="T2"> melalui fasilitas ekspor hasil perlombaan ke dalam format dokumen yang dapat digunakan sebagai arsip maupun laporan resmi penyelenggara. </text:span></text:p>
        </text:list-item>
        <text:list-item>
          <text:p text:style-name="P11"><text:span text:style-name="Strong_20_Emphasis"><text:span text:style-name="T2">Menjamin keamanan dan integritas data penilaian</text:span></text:span><text:span text:style-name="T2"> dengan menerapkan mekanisme autentikasi, pembatasan hak akses berdasarkan peran pengguna, serta penguncian hasil penilaian setelah proses penilaian selesai. </text:span></text:p>
        </text:list-item>
        <text:list-item>
          <text:p text:style-name="P11"><text:soft-page-break/><text:span text:style-name="Strong_20_Emphasis"><text:span text:style-name="T2">Menyediakan sistem yang mudah dikembangkan</text:span></text:span><text:span text:style-name="T2"> sehingga pada pengembangan berikutnya sistem dapat mendukung kebutuhan perlombaan yang lebih kompleks tanpa harus mengubah arsitektur secara menyeluruh.</text:span><text:span text:style-name="T3"><text:tab/></text:span></text:p>
        </text:list-item>
      </text:list>
      <text:list text:continue-list="list111335157513142" text:style-name="L1">
        <text:list-header>
          <text:p text:style-name="P12"/>
        </text:list-header>
      </text:list>
      <text:list xml:id="list3776235157" text:style-name="L3">
        <text:list-item>
          <text:p text:style-name="P13"><text:span text:style-name="T4">Stakeholder</text:span><text:span text:style-name="Strong_20_Emphasis"><text:span text:style-name="T5"> : </text:span></text:span></text:p>
          <text:p text:style-name="P13"><text:span text:style-name="Strong_20_Emphasis"><text:span text:style-name="T6">1. </text:span></text:span><text:span text:style-name="Strong_20_Emphasis"><text:span text:style-name="T7">Penyelenggara Lomba</text:span></text:span></text:p>
        </text:list-item>
      </text:list>
      <text:p text:style-name="P14"><text:span text:style-name="Strong_20_Emphasis"><text:span text:style-name="T2"><text:tab/>Peran</text:span></text:span><text:span text:style-name="T2"><text:line-break/><text:tab/>Pihak yang bertanggung jawab atas penyelenggaraan Sedjati Learning Championship.</text:span></text:p>
      <text:p text:style-name="P14"><text:span text:style-name="Strong_20_Emphasis"><text:span text:style-name="T2"><text:tab/>Kepentingan</text:span></text:span></text:p>
      <text:list text:style-name="L4">
        <text:list-item>
          <text:list>
            <text:list-item>
              <text:p text:style-name="P15">Memastikan proses perlombaan berjalan sesuai aturan. </text:p>
            </text:list-item>
            <text:list-item>
              <text:p text:style-name="P15">Memastikan hasil penilaian akurat dan dapat dipertanggungjawabkan. </text:p>
            </text:list-item>
            <text:list-item>
              <text:p text:style-name="P16">Memperoleh laporan hasil perlombaan.</text:p>
            </text:list-item>
          </text:list>
        </text:list-item>
      </text:list>
      <text:list xml:id="list111334430247517" text:continue-list="list3776235157" text:style-name="L3">
        <text:list-header>
          <text:h text:style-name="P17" text:outline-level="2"><text:span text:style-name="Strong_20_Emphasis"><text:span text:style-name="T7">2. Administrator Sistem</text:span></text:span></text:h>
        </text:list-header>
      </text:list>
      <text:p text:style-name="P18"><text:span text:style-name="Strong_20_Emphasis"><text:span text:style-name="T8"><text:tab/>Peran</text:span></text:span><text:span text:style-name="T8"><text:line-break/><text:tab/>Panitia yang bertugas mengelola aplikasi selama perlombaan berlangsung.</text:span></text:p>
      <text:p text:style-name="P18"><text:span text:style-name="Strong_20_Emphasis"><text:span text:style-name="T8"><text:tab/>Kepentingan</text:span></text:span></text:p>
      <text:list text:style-name="L5">
        <text:list-item>
          <text:list>
            <text:list-item>
              <text:p text:style-name="P19">Mengelola data peserta. </text:p>
            </text:list-item>
            <text:list-item>
              <text:p text:style-name="P19">Mengelola data juri. </text:p>
            </text:list-item>
            <text:list-item>
              <text:p text:style-name="P19">Mengelola panel juri. </text:p>
            </text:list-item>
            <text:list-item>
              <text:p text:style-name="P19">Mengelola ronde perlombaan. </text:p>
            </text:list-item>
            <text:list-item>
              <text:p text:style-name="P19">Mengelola kriteria penilaian. </text:p>
            </text:list-item>
            <text:list-item>
              <text:p text:style-name="P19">Mempublikasikan hasil. </text:p>
            </text:list-item>
            <text:list-item>
              <text:p text:style-name="P20">Mengekspor laporan.</text:p>
            </text:list-item>
          </text:list>
        </text:list-item>
      </text:list>
      <text:list text:continue-list="list111334430247517" text:style-name="L3">
        <text:list-header>
          <text:h text:style-name="P17" text:outline-level="2"><text:span text:style-name="Strong_20_Emphasis"><text:span text:style-name="T6">3. </text:span></text:span><text:span text:style-name="Strong_20_Emphasis"><text:span text:style-name="T7">Dewan Juri</text:span></text:span></text:h>
        </text:list-header>
      </text:list>
      <text:p text:style-name="P21"><text:span text:style-name="Strong_20_Emphasis"><text:span text:style-name="T8">Peran</text:span></text:span><text:span text:style-name="T8"><text:line-break/>Memberikan penilaian kepada peserta sesuai panel dan ronde yang ditugaskan.</text:span></text:p>
      <text:p text:style-name="P21"><text:span text:style-name="Strong_20_Emphasis"><text:span text:style-name="T8">Kepentingan</text:span></text:span></text:p>
      <text:list text:style-name="L6">
        <text:list-item>
          <text:list>
            <text:list-item>
              <text:p text:style-name="P22">Mengakses daftar peserta yang menjadi tanggung jawabnya. </text:p>
            </text:list-item>
            <text:list-item>
              <text:p text:style-name="P22">Memberikan nilai berdasarkan kriteria yang telah ditentukan. </text:p>
            </text:list-item>
            <text:list-item>
              <text:p text:style-name="P23">Melakukan revisi nilai sebelum penilaian dikunci.</text:p>
            </text:list-item>
          </text:list>
        </text:list-item>
      </text:list>
      <text:h text:style-name="P24" text:outline-level="2"><text:soft-page-break/><text:span text:style-name="Strong_20_Emphasis"><text:span text:style-name="T6">4. </text:span></text:span><text:span text:style-name="Strong_20_Emphasis"><text:span text:style-name="T7">Peserta</text:span></text:span></text:h>
      <text:p text:style-name="P21"><text:span text:style-name="Strong_20_Emphasis"><text:span text:style-name="T8">Peran</text:span></text:span><text:span text:style-name="T8"><text:line-break/>Individu atau tim yang mengikuti perlombaan.</text:span></text:p>
      <text:p text:style-name="P21"><text:span text:style-name="Strong_20_Emphasis"><text:span text:style-name="T8">Kepentingan</text:span></text:span></text:p>
      <text:list text:style-name="L7">
        <text:list-item>
          <text:list>
            <text:list-item>
              <text:p text:style-name="P25">Mengikuti proses perlombaan. </text:p>
            </text:list-item>
            <text:list-item>
              <text:p text:style-name="P25">Mengetahui hasil akhir perlombaan. </text:p>
            </text:list-item>
            <text:list-item>
              <text:p text:style-name="P26">Melihat peringkat setelah diumumkan. </text:p>
            </text:list-item>
          </text:list>
        </text:list-item>
      </text:list>
      <text:h text:style-name="P27" text:outline-level="2"><text:span text:style-name="Strong_20_Emphasis"><text:span text:style-name="T7">5. Penonton / Publik</text:span></text:span></text:h>
      <text:p text:style-name="P21"><text:span text:style-name="Strong_20_Emphasis"><text:span text:style-name="T8">Peran</text:span></text:span><text:span text:style-name="T8"><text:line-break/>Masyarakat yang mengikuti jalannya perlombaan.</text:span></text:p>
      <text:p text:style-name="P21"><text:span text:style-name="Strong_20_Emphasis"><text:span text:style-name="T8">Kepentingan</text:span></text:span></text:p>
      <text:list text:style-name="L8">
        <text:list-item>
          <text:list>
            <text:list-item>
              <text:p text:style-name="P28">Melihat leaderboard. </text:p>
            </text:list-item>
            <text:list-item>
              <text:p text:style-name="P29">Melihat hasil akhir perlombaan setelah dipublikasikan.</text:p>
            </text:list-item>
          </text:list>
        </text:list-item>
      </text:list>
      <text:p text:style-name="P30"><text:span text:style-name="Strong_20_Emphasis"><text:span text:style-name="T7"/></text:span></text:p>
      <text:list text:style-name="L9">
        <text:list-item>
          <text:p text:style-name="P31"><text:span text:style-name="Strong_20_Emphasis"><text:span text:style-name="T2">Deskripsikan Fitur Utama:</text:span></text:span><text:span text:style-name="T2"> Tuliskan daftar fitur yang diinginkan disertai penjelasan seperti tujuan fitur, prioritas (misalnya: </text:span><text:span text:style-name="Emphasis"><text:span text:style-name="T2">must have, nice to have</text:span></text:span><text:span text:style-name="T2">), dan alur pengguna (</text:span><text:span text:style-name="Emphasis"><text:span text:style-name="T2">user flow)</text:span></text:span><text:span text:style-name="T2"> </text:span></text:p>
        </text:list-item>
        <text:list-item>
          <text:p text:style-name="P32">Fitur Utama :</text:p>
          <text:h text:style-name="P33" text:outline-level="1">1. Modul Autentikasi</text:h>
        </text:list-item>
      </text:list>
      <text:p text:style-name="P34">Fitur yang berkaitan dengan akses ke sistem.</text:p>
      <text:h text:style-name="P35" text:outline-level="3">Fitur</text:h>
      <text:list text:style-name="L10">
        <text:list-item>
          <text:p text:style-name="P36">Login Administrator </text:p>
        </text:list-item>
        <text:list-item>
          <text:p text:style-name="P36">Login Juri </text:p>
        </text:list-item>
        <text:list-item>
          <text:p text:style-name="P36">Logout </text:p>
        </text:list-item>
        <text:list-item>
          <text:p text:style-name="P36">Ubah Password </text:p>
        </text:list-item>
        <text:list-item>
          <text:p text:style-name="P37">Reset Password (oleh Administrator) </text:p>
        </text:list-item>
      </text:list>
      <text:p text:style-name="P38"/>
      <text:h text:style-name="P39" text:outline-level="1">2. Modul Dashboard</text:h>
      <text:p text:style-name="P34">Menyediakan ringkasan kondisi perlombaan.</text:p>
      <text:h text:style-name="P35" text:outline-level="3"><text:soft-page-break/>Administrator</text:h>
      <text:list text:style-name="L11">
        <text:list-item>
          <text:p text:style-name="P40">Ringkasan jumlah peserta </text:p>
        </text:list-item>
        <text:list-item>
          <text:p text:style-name="P40">Ringkasan jumlah juri </text:p>
        </text:list-item>
        <text:list-item>
          <text:p text:style-name="P40">Ringkasan panel juri </text:p>
        </text:list-item>
        <text:list-item>
          <text:p text:style-name="P40">Ringkasan ronde </text:p>
        </text:list-item>
        <text:list-item>
          <text:p text:style-name="P40">Progress penilaian </text:p>
        </text:list-item>
        <text:list-item>
          <text:p text:style-name="P40">Status publish hasil </text:p>
        </text:list-item>
        <text:list-item>
          <text:p text:style-name="P41">Statistik penilaian </text:p>
        </text:list-item>
      </text:list>
      <text:h text:style-name="P35" text:outline-level="3" text:is-list-header="true">Juri</text:h>
      <text:list text:style-name="L12">
        <text:list-item>
          <text:p text:style-name="P42">Informasi panel yang ditugaskan </text:p>
        </text:list-item>
        <text:list-item>
          <text:p text:style-name="P42">Daftar peserta yang harus dinilai </text:p>
        </text:list-item>
        <text:list-item>
          <text:p text:style-name="P42">Status penilaian </text:p>
        </text:list-item>
        <text:list-item>
          <text:p text:style-name="P43">Jumlah peserta yang belum dinilai </text:p>
        </text:list-item>
      </text:list>
      <text:p text:style-name="P38"/>
      <text:h text:style-name="P39" text:outline-level="1">3. Modul Manajemen Peserta</text:h>
      <text:p text:style-name="P34">Mengelola seluruh data peserta perlombaan.</text:p>
      <text:h text:style-name="P35" text:outline-level="3">Fitur</text:h>
      <text:list text:style-name="L13">
        <text:list-item>
          <text:p text:style-name="P44">Tambah peserta </text:p>
        </text:list-item>
        <text:list-item>
          <text:p text:style-name="P44">Edit peserta </text:p>
        </text:list-item>
        <text:list-item>
          <text:p text:style-name="P44">Hapus peserta </text:p>
        </text:list-item>
        <text:list-item>
          <text:p text:style-name="P44">Import peserta dari Excel </text:p>
        </text:list-item>
        <text:list-item>
          <text:p text:style-name="P44">Pencarian peserta </text:p>
        </text:list-item>
        <text:list-item>
          <text:p text:style-name="P44">Filter peserta </text:p>
        </text:list-item>
        <text:list-item>
          <text:p text:style-name="P45">Detail peserta </text:p>
        </text:list-item>
      </text:list>
      <text:p text:style-name="P38"/>
      <text:h text:style-name="P39" text:outline-level="1">4. Modul Manajemen Juri</text:h>
      <text:p text:style-name="P34">Mengelola akun dan informasi juri.</text:p>
      <text:h text:style-name="P35" text:outline-level="3"><text:soft-page-break/>Fitur</text:h>
      <text:list text:style-name="L14">
        <text:list-item>
          <text:p text:style-name="P46">Tambah juri </text:p>
        </text:list-item>
        <text:list-item>
          <text:p text:style-name="P46">Edit juri </text:p>
        </text:list-item>
        <text:list-item>
          <text:p text:style-name="P46">Nonaktifkan juri </text:p>
        </text:list-item>
        <text:list-item>
          <text:p text:style-name="P46">Reset password juri </text:p>
        </text:list-item>
        <text:list-item>
          <text:p text:style-name="P47">Pencarian juri </text:p>
        </text:list-item>
      </text:list>
      <text:p text:style-name="P38"/>
      <text:h text:style-name="P39" text:outline-level="1">5. Modul Panel Juri</text:h>
      <text:p text:style-name="P34">Mengelola pembagian juri ke dalam panel.</text:p>
      <text:h text:style-name="P35" text:outline-level="3">Fitur</text:h>
      <text:list text:style-name="L15">
        <text:list-item>
          <text:p text:style-name="P48">Membuat panel </text:p>
        </text:list-item>
        <text:list-item>
          <text:p text:style-name="P48">Menambahkan juri ke panel </text:p>
        </text:list-item>
        <text:list-item>
          <text:p text:style-name="P48">Menghapus juri dari panel </text:p>
        </text:list-item>
        <text:list-item>
          <text:p text:style-name="P49">Melihat anggota panel </text:p>
        </text:list-item>
      </text:list>
      <text:p text:style-name="P38"/>
      <text:h text:style-name="P39" text:outline-level="1">6. Modul Manajemen Ronde</text:h>
      <text:p text:style-name="P34">Mengatur tahapan perlombaan.</text:p>
      <text:h text:style-name="P35" text:outline-level="3">Fitur</text:h>
      <text:list text:style-name="L16">
        <text:list-item>
          <text:p text:style-name="P50">Tambah ronde </text:p>
        </text:list-item>
        <text:list-item>
          <text:p text:style-name="P50">Edit ronde </text:p>
        </text:list-item>
        <text:list-item>
          <text:p text:style-name="P50">Menentukan urutan ronde </text:p>
        </text:list-item>
        <text:list-item>
          <text:p text:style-name="P50">Menentukan bobot ronde </text:p>
        </text:list-item>
        <text:list-item>
          <text:p text:style-name="P50">Mengaktifkan ronde </text:p>
        </text:list-item>
        <text:list-item>
          <text:p text:style-name="P51">Mengunci ronde (Lock Round) </text:p>
        </text:list-item>
      </text:list>
      <text:p text:style-name="P38"/>
      <text:h text:style-name="P39" text:outline-level="1">7. Modul Kriteria Penilaian</text:h>
      <text:p text:style-name="P34">Mengatur aspek penilaian.</text:p>
      <text:h text:style-name="P35" text:outline-level="3"><text:soft-page-break/>Fitur</text:h>
      <text:list text:style-name="L17">
        <text:list-item>
          <text:p text:style-name="P52">Tambah kriteria </text:p>
        </text:list-item>
        <text:list-item>
          <text:p text:style-name="P52">Edit kriteria </text:p>
        </text:list-item>
        <text:list-item>
          <text:p text:style-name="P52">Hapus kriteria </text:p>
        </text:list-item>
        <text:list-item>
          <text:p text:style-name="P52">Menentukan bobot kriteria </text:p>
        </text:list-item>
        <text:list-item>
          <text:p text:style-name="P52">Menentukan rentang nilai </text:p>
        </text:list-item>
        <text:list-item>
          <text:p text:style-name="P53">Validasi total bobot = 100% </text:p>
        </text:list-item>
      </text:list>
      <text:p text:style-name="P38"/>
      <text:h text:style-name="P39" text:outline-level="1">8. Modul Assignment Peserta</text:h>
      <text:p text:style-name="P34">Menghubungkan peserta dengan panel juri.</text:p>
      <text:h text:style-name="P35" text:outline-level="3">Fitur</text:h>
      <text:list text:style-name="L18">
        <text:list-item>
          <text:p text:style-name="P54">Assign peserta ke panel </text:p>
        </text:list-item>
        <text:list-item>
          <text:p text:style-name="P54">Pindah panel </text:p>
        </text:list-item>
        <text:list-item>
          <text:p text:style-name="P55">Melihat daftar peserta setiap panel </text:p>
        </text:list-item>
      </text:list>
      <text:p text:style-name="P38"/>
      <text:h text:style-name="P39" text:outline-level="1">9. Modul Penilaian</text:h>
      <text:p text:style-name="P34">Digunakan oleh juri untuk memberikan nilai.</text:p>
      <text:h text:style-name="P35" text:outline-level="3">Fitur</text:h>
      <text:list text:style-name="L19">
        <text:list-item>
          <text:p text:style-name="P56">Melihat daftar peserta </text:p>
        </text:list-item>
        <text:list-item>
          <text:p text:style-name="P56">Input nilai </text:p>
        </text:list-item>
        <text:list-item>
          <text:p text:style-name="P56">Edit nilai </text:p>
        </text:list-item>
        <text:list-item>
          <text:p text:style-name="P56">Simpan draft </text:p>
        </text:list-item>
        <text:list-item>
          <text:p text:style-name="P56">Submit nilai final </text:p>
        </text:list-item>
        <text:list-item>
          <text:p text:style-name="P57">Validasi kelengkapan penilaian </text:p>
        </text:list-item>
      </text:list>
      <text:p text:style-name="P38"/>
      <text:h text:style-name="P39" text:outline-level="1">10. Modul Perhitungan Nilai</text:h>
      <text:p text:style-name="P34">Dilakukan otomatis oleh sistem.</text:p>
      <text:h text:style-name="P35" text:outline-level="3"><text:soft-page-break/>Fitur</text:h>
      <text:list text:style-name="L20">
        <text:list-item>
          <text:p text:style-name="P58">Menghitung nilai berdasarkan bobot </text:p>
        </text:list-item>
        <text:list-item>
          <text:p text:style-name="P58">Menghitung nilai akhir </text:p>
        </text:list-item>
        <text:list-item>
          <text:p text:style-name="P58">Menghitung ranking </text:p>
        </text:list-item>
        <text:list-item>
          <text:p text:style-name="P59">Menentukan pemenang </text:p>
        </text:list-item>
      </text:list>
      <text:p text:style-name="P38"/>
      <text:h text:style-name="P39" text:outline-level="1">11. Modul Monitoring</text:h>
      <text:p text:style-name="P34">Digunakan administrator selama perlombaan berlangsung.</text:p>
      <text:h text:style-name="P35" text:outline-level="3">Fitur</text:h>
      <text:list text:style-name="L21">
        <text:list-item>
          <text:p text:style-name="P60">Melihat progres penilaian </text:p>
        </text:list-item>
        <text:list-item>
          <text:p text:style-name="P60">Mengetahui peserta yang belum dinilai </text:p>
        </text:list-item>
        <text:list-item>
          <text:p text:style-name="P60">Mengetahui juri yang belum menyelesaikan penilaian </text:p>
        </text:list-item>
        <text:list-item>
          <text:p text:style-name="P61">Monitoring status setiap ronde </text:p>
        </text:list-item>
      </text:list>
      <text:p text:style-name="P38"/>
      <text:h text:style-name="P39" text:outline-level="1">12. Modul Publikasi Hasil</text:h>
      <text:p text:style-name="P34">Mengatur kapan hasil dapat dilihat.</text:p>
      <text:h text:style-name="P35" text:outline-level="3">Fitur</text:h>
      <text:list text:style-name="L22">
        <text:list-item>
          <text:p text:style-name="P62">Publish hasil </text:p>
        </text:list-item>
        <text:list-item>
          <text:p text:style-name="P62">Unpublish hasil </text:p>
        </text:list-item>
        <text:list-item>
          <text:p text:style-name="P62">Leaderboard </text:p>
        </text:list-item>
        <text:list-item>
          <text:p text:style-name="P63">Detail nilai peserta </text:p>
        </text:list-item>
      </text:list>
      <text:p text:style-name="P38"/>
      <text:h text:style-name="P39" text:outline-level="1">13. Modul Laporan</text:h>
      <text:p text:style-name="P34">Menghasilkan laporan perlombaan.</text:p>
      <text:h text:style-name="P35" text:outline-level="3">Fitur</text:h>
      <text:list text:style-name="L23">
        <text:list-item>
          <text:p text:style-name="P64">Export PDF </text:p>
        </text:list-item>
        <text:list-item>
          <text:p text:style-name="P64"><text:soft-page-break/>Export Excel </text:p>
        </text:list-item>
        <text:list-item>
          <text:p text:style-name="P64">Rekap nilai </text:p>
        </text:list-item>
        <text:list-item>
          <text:p text:style-name="P65">Rekap ranking</text:p>
        </text:list-item>
      </text:list>
      <text:list text:style-name="L24">
        <text:list-header>
          <text:p text:style-name="P66"/>
        </text:list-header>
      </text:list>
      <text:list text:style-name="L25">
        <text:list-item>
          <text:p text:style-name="P67"><text:span text:style-name="Strong_20_Emphasis"><text:span text:style-name="T2">Tentukan Asumsi dan Batasan</text:span></text:span><text:span text:style-name="T2"> </text:span></text:p>
        </text:list-item>
      </text:list>
      <text:list text:style-name="L26">
        <text:list-item>
          <text:p text:style-name="P68">Cantumkan asumsi seperti: </text:p>
          <text:list>
            <text:list-item>
              <text:p text:style-name="P68">Pengguna memiliki koneksi internet </text:p>
            </text:list-item>
            <text:list-item>
              <text:p text:style-name="P68">Hanya tersedia di Android untuk versi awal </text:p>
            </text:list-item>
          </text:list>
        </text:list-item>
        <text:list-item>
          <text:p text:style-name="P68">Dan juga batasan seperti: </text:p>
          <text:list>
            <text:list-item>
              <text:p text:style-name="P68">Tidak mendukung notifikasi Lokasi </text:p>
            </text:list-item>
            <text:list-item>
              <text:p text:style-name="P68">Tidak menyimpan data medis pengguna </text:p>
            </text:list-item>
          </text:list>
        </text:list-item>
        <text:list-item>
          <text:p text:style-name="P69"><text:span text:style-name="Strong_20_Emphasis"><text:span text:style-name="T2">Tulis dalam Bahasa yang Jelas dan Tidak Ambigu: </text:span></text:span><text:span text:style-name="T2">Gunakan bahasa yang mudah dipahami lintas fungsi, hindari jargon teknis yang tidak perlu. </text:span></text:p>
        </text:list-item>
        <text:list-item>
          <text:p text:style-name="P70"><text:span text:style-name="Strong_20_Emphasis"><text:span text:style-name="T2">Gunakan Format Visual Bila Perlu:</text:span></text:span><text:span text:style-name="T2"> Tambahkan wireframe, diagram alur (</text:span><text:span text:style-name="Emphasis"><text:span text:style-name="T2">flowchart</text:span></text:span><text:span text:style-name="T2">), atau </text:span><text:span text:style-name="Emphasis"><text:span text:style-name="T2">mockup</text:span></text:span><text:span text:style-name="T2"> sederhana agar lebih mudah dipahami. </text:span></text:p>
        </text:list-item>
      </text:list>
      <text:h text:style-name="P71" text:outline-level="1">Asumsi Sistem (Assumptions)</text:h>
      <text:p text:style-name="P72">Pengembangan Sistem Penilaian Sedjati Learning Championship dilakukan dengan beberapa asumsi sebagai berikut:</text:p>
      <text:h text:style-name="P73" text:outline-level="3">A-01. Sistem digunakan untuk satu penyelenggaraan lomba</text:h>
      <text:p text:style-name="P72">Sistem dirancang khusus untuk mendukung satu penyelenggaraan Sedjati Learning Championship dan tidak mendukung pengelolaan beberapa event secara bersamaan.</text:p>
      <text:p text:style-name="P74"/>
      <text:h text:style-name="P73" text:outline-level="3">A-02. Seluruh pengguna telah memiliki akun</text:h>
      <text:p text:style-name="P72">Administrator akan membuat akun untuk setiap juri sebelum perlombaan dimulai sehingga juri dapat melakukan login ke dalam sistem.</text:p>
      <text:p text:style-name="P74"/>
      <text:h text:style-name="P73" text:outline-level="3"><text:soft-page-break/>A-03. Data peserta telah lengkap</text:h>
      <text:p text:style-name="P72">Data peserta dianggap telah diverifikasi oleh panitia sebelum dimasukkan ke dalam sistem.</text:p>
      <text:p text:style-name="P74"/>
      <text:h text:style-name="P73" text:outline-level="3">A-04. Penilaian dilakukan secara online</text:h>
      <text:p text:style-name="P72">Seluruh proses pemberian nilai dilakukan menggunakan perangkat yang terhubung ke jaringan internet.</text:p>
      <text:p text:style-name="P74"/>
      <text:h text:style-name="P73" text:outline-level="3">A-05. Aturan perlombaan telah ditetapkan sebelum penilaian dimulai</text:h>
      <text:p text:style-name="P72">Struktur ronde, panel juri, kriteria penilaian, serta bobot penilaian telah ditentukan oleh panitia sebelum proses penilaian berlangsung.</text:p>
      <text:p text:style-name="P74"/>
      <text:h text:style-name="P73" text:outline-level="3">A-06. Juri memahami mekanisme penilaian</text:h>
      <text:p text:style-name="P72">Setiap juri telah mendapatkan pengarahan mengenai tata cara penggunaan sistem dan mekanisme penilaian sesuai ketentuan perlombaan.</text:p>
      <text:p text:style-name="P74"/>
      <text:h text:style-name="P73" text:outline-level="3">A-07. Seluruh perhitungan nilai mengikuti aturan yang telah ditentukan</text:h>
      <text:p text:style-name="P72">Sistem tidak menentukan metode penilaian, melainkan hanya menghitung nilai berdasarkan konfigurasi yang telah ditetapkan oleh administrator.</text:p>
      <text:p text:style-name="P74"/>
      <text:h text:style-name="P71" text:outline-level="1">8. Batasan Sistem (Constraints)</text:h>
      <text:p text:style-name="P72">Sistem memiliki beberapa batasan sebagai berikut:</text:p>
      <text:h text:style-name="P73" text:outline-level="3">C-01. Single Event</text:h>
      <text:p text:style-name="P72">Sistem hanya mendukung satu event perlombaan.</text:p>
      <text:p text:style-name="P74"><text:soft-page-break/></text:p>
      <text:h text:style-name="P73" text:outline-level="3">C-02. Berbasis Web</text:h>
      <text:p text:style-name="P72">Sistem hanya dapat diakses melalui web browser dan belum menyediakan aplikasi mobile khusus.</text:p>
      <text:p text:style-name="P74"/>
      <text:h text:style-name="P73" text:outline-level="3">C-03. Role Pengguna Terbatas</text:h>
      <text:p text:style-name="P72">Versi pertama sistem hanya memiliki dua pengguna yang melakukan autentikasi, yaitu:</text:p>
      <text:list text:style-name="L27">
        <text:list-item>
          <text:p text:style-name="P75">Administrator </text:p>
        </text:list-item>
        <text:list-item>
          <text:p text:style-name="P76">Juri </text:p>
        </text:list-item>
      </text:list>
      <text:p text:style-name="P72">Sedangkan Public hanya dapat mengakses halaman hasil tanpa login.</text:p>
      <text:p text:style-name="P74"/>
      <text:h text:style-name="P73" text:outline-level="3">C-04. Penilaian Dilakukan Sesuai Panel</text:h>
      <text:p text:style-name="P72">Juri hanya dapat memberikan nilai kepada peserta yang telah ditugaskan pada panelnya.</text:p>
      <text:p text:style-name="P74"/>
      <text:h text:style-name="P73" text:outline-level="3">C-05. Penilaian Tidak Dapat Diubah Setelah Dikunci</text:h>
      <text:p text:style-name="P72">Nilai yang telah dikunci oleh administrator tidak dapat diubah kembali.</text:p>
      <text:p text:style-name="P74"/>
      <text:h text:style-name="P73" text:outline-level="3">C-06. Leaderboard Bersifat Terkendali</text:h>
      <text:p text:style-name="P72">Hasil perlombaan hanya dapat dilihat setelah administrator melakukan proses publikasi.</text:p>
      <text:p text:style-name="P74"/>
      <text:h text:style-name="P73" text:outline-level="3"><text:soft-page-break/>C-07. Tidak Mendukung Penjadwalan Perlombaan</text:h>
      <text:p text:style-name="P72">Sistem tidak mengatur jadwal pertandingan, waktu tampil peserta, maupun manajemen ruangan perlombaan.</text:p>
      <text:p text:style-name="P74"/>
      <text:h text:style-name="P73" text:outline-level="3">C-08. Tidak Mendukung Pembayaran</text:h>
      <text:p text:style-name="P72">Sistem tidak menyediakan fitur pendaftaran maupun pembayaran peserta.</text:p>
      <text:p text:style-name="P74"/>
      <text:h text:style-name="P73" text:outline-level="3">C-09. Tidak Menyediakan Fitur Komunikasi</text:h>
      <text:p text:style-name="P72">Sistem tidak menyediakan fasilitas chat, komentar, ataupun komunikasi antara peserta, juri, dan administrator.</text:p>
      <text:p text:style-name="P74"/>
      <text:h text:style-name="P73" text:outline-level="3">C-10. Tidak Terintegrasi dengan Sistem Eksternal</text:h>
      <text:p text:style-name="P72">Versi pertama belum mendukung integrasi dengan sistem pihak ketiga seperti email, WhatsApp, Google Calendar, atau Single Sign-On (SSO).</text:p>
      <text:p text:style-name="P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3T21:58:05.826628722</meta:creation-date>
    <dc:date>2026-07-14T11:13:28.157650368</dc:date>
    <meta:editing-duration>PT37M53S</meta:editing-duration>
    <meta:editing-cycles>5</meta:editing-cycles>
    <meta:generator>LibreOffice/26.2.4.2$Linux_X86_64 LibreOffice_project/620$Build-2</meta:generator>
    <meta:document-statistic meta:table-count="0" meta:image-count="0" meta:object-count="0" meta:page-count="12" meta:paragraph-count="219" meta:word-count="1557" meta:character-count="11481" meta:non-whitespace-character-count="10151"/>
  </office:meta>
</office:document-meta>
</file>